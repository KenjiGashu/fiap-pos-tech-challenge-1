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officeooo:rsid="00138341" officeooo:paragraph-rsid="00138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cipantes:</text:p>
      <text:p text:style-name="P1">- Lucas Kenji Gashu (KenjiGashu)</text:p>
      <text:p text:style-name="P1"/>
      <text:p text:style-name="P1">Documentação:</text:p>
      <text:p text:style-name="P1"><text:a xlink:type="simple" xlink:href="https://miro.com/app/board/uXjVGkR23w0=/" text:style-name="Internet_20_link" text:visited-style-name="Visited_20_Internet_20_Link">https://miro.com/app/board/uXjVGkR23w0=/</text:a></text:p>
      <text:p text:style-name="P1"/>
      <text:p text:style-name="P1">Repositório:</text:p>
      <text:p text:style-name="P1"><text:a xlink:type="simple" xlink:href="https://github.com/KenjiGashu/fiap-pos-tech-challenge-1" text:style-name="Internet_20_link" text:visited-style-name="Visited_20_Internet_20_Link">https://github.com/KenjiGashu/fiap-pos-tech-challenge-1</text:a></text:p>
      <text:p text:style-name="P1"/>
      <text:p text:style-name="P1">Relatório:</text:p>
      <text:p text:style-name="P1">Não consegui gerar relatorio em pdf ao invés disso gerei um json com os issu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9T11:08:25.429295724</meta:creation-date>
    <dc:date>2026-05-09T13:37:02.723030589</dc:date>
    <meta:editing-duration>PT2H17M13S</meta:editing-duration>
    <meta:editing-cycles>1</meta:editing-cycles>
    <meta:document-statistic meta:table-count="0" meta:image-count="0" meta:object-count="0" meta:page-count="1" meta:paragraph-count="8" meta:word-count="26" meta:character-count="255" meta:non-whitespace-character-count="237"/>
    <meta:generator>LibreOffice/26.2.3.2$Linux_X86_64 LibreOffice_project/620$Build-2</meta:generator>
  </office:meta>
</office:document-meta>
</file>